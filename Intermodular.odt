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A000002BBFA6B41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423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fo:font-weight="normal"/>
    </style:style>
    <style:style style:name="P7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7pt" fo:font-style="normal" style:text-underline-style="none" fo:font-weight="bold" style:text-blinking="false" fo:background-color="transparent"/>
    </style:style>
    <style:style style:name="P8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2" fo:font-size="17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left="0cm" fo:margin-right="0cm" fo:margin-top="0.494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style:text-blinking="false" fo:background-color="transparent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62f2937-7fff-af61-9f2f-8531a46d45c9"/>He elegido Amazon Web Services AWS como proveedor de servicios en la nube porque es muy conocido y lo usa mucha gente además también tiene muchas herramientas para hacer distintos tipos de proyectos. Voy a poner unos ejemplos:</text:p>
      <text:p text:style-name="P1">AWS permite subir o bajar los recursos según lo que necesites sin tener que comprar ordenadores o servidores y eso es una gran ventaja</text:p>
      <text:p text:style-name="P1">Sus centros de datos están en muchos países por eso es difícil que falle y suele funcionar bien casi siempre</text:p>
      <text:p text:style-name="P1">Solo pagas por lo que usas así no gastas dinero de más y para empezar está muy bien</text:p>
      <text:p text:style-name="P1">Tiene medidas de seguridad para proteger los datos como el cifrado y los permisos de acceso</text:p>
      <text:p text:style-name="P1">Tiene servicios para guardar archivos y hacer bases de datos y usar máquinas virtuales o trabajar con inteligencia artificial</text:p>
      <text:p text:style-name="P1">Es fácil de usar </text:p>
      <text:p text:style-name="P2">Arquitectura cloud propuesta</text:p>
      <text:p text:style-name="P1">La arquitectura cloud del proyecto se basa en Amazon Web Services AWS para poder ejecutar la aplicación de forma sencilla y segura</text:p>
      <text:p text:style-name="P1">La aplicación se ejecuta en servidores virtuales en la nube que se llaman instancias y permiten que el programa esté siempre encendido y accesible desde internet sin necesidad de un ordenador físico en la empresa</text:p>
      <text:p text:style-name="P1">La base de datos estaría en un servicio de almacenamiento en la nube donde se guardan todos los datos de forma segura y con copias de seguridad automáticas para evitar pérdidas de información</text:p>
      <text:p text:style-name="P1">Los usuarios accederán al sistema desde cualquier dispositivo con conexión a internet usando un navegador web o una aplicación y entrarían con un usuario y contraseña para poder trabajar con la plataforma de forma segura</text:p>
      <text:p text:style-name="P3"/>
      <text:p text:style-name="P3"><text:soft-page-break/>Aquí voy a dejar un esquema para que te puedas hacer una mejor idea y quede mucho mas claro </text:p>
      <text:p text:style-name="P4"><text:line-break/><text:span text:style-name="T1"><draw:frame draw:style-name="fr1" draw:name="Imagen1" text:anchor-type="as-char" svg:width="15.928cm" svg:height="13.229cm" draw:z-index="0"><draw:image xlink:href="Pictures/100000010000034A000002BBFA6B410A.png" xlink:type="simple" xlink:show="embed" xlink:actuate="onLoad" draw:mime-type="image/png"/></draw:frame></text:span></text:p>
      <text:p text:style-name="P5">Y como se puede apreciar utilizará una base de datos gestionada que esto lo que hace es que el proveedor se encarga de la instalación el mantenimiento las copias de seguridad y las actualizaciones y tú solo la usas para guardar y consultar datos. y yo creo que es una muy buena idea</text:p>
      <text:p text:style-name="P6"><text:line-break/><text:line-break/></text:p>
      <text:h text:style-name="P7" text:outline-level="2"/>
      <text:h text:style-name="P8" text:outline-level="2">Costes</text:h>
      <text:h text:style-name="P9" text:outline-level="3">EC2</text:h>
      <text:p text:style-name="P5">t3.micro</text:p>
      <text:p text:style-name="P5">Linux</text:p>
      <text:p text:style-name="P5">730 horas al mes</text:p>
      <text:h text:style-name="P9" text:outline-level="3">RDS</text:h>
      <text:p text:style-name="P5">MySQL</text:p>
      <text:p text:style-name="P5">db.t3.micro</text:p>
      <text:p text:style-name="P5">20 GB almacenamiento</text:p>
      <text:p text:style-name="P5">Single AZ</text:p>
      <text:h text:style-name="P9" text:outline-level="3">Load Balancer</text:h>
      <text:p text:style-name="P5">Uso básico</text:p>
      <text:p text:style-name="P5">730 horas al mes</text:p>
      <text:h text:style-name="P7" text:outline-level="2">Coste estimado</text:h>
      <text:p text:style-name="P5">EC2: 10 € a 20 €</text:p>
      <text:p text:style-name="P5">RDS: 15 € a 40 €</text:p>
      <text:p text:style-name="P5">Load Balancer: 5 € a 15 €</text:p>
      <text:p text:style-name="Text_20_body"/>
      <text:h text:style-name="P7" text:outline-level="2"><text:soft-page-break/>Total</text:h>
      <text:p text:style-name="P5">Entre 30 € y 80 € al mes</text:p>
      <text:p text:style-name="P5">Entonces ya visto lo que cuesta en mi opinión es un muy buen precio ya que no es nada caro</text:p>
      <text:p text:style-name="P5">Y si que existe un nivel gratuito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08:54:17.052257000</meta:creation-date>
    <dc:date>2026-05-18T09:05:17.702549100</dc:date>
    <meta:editing-duration>PT47S</meta:editing-duration>
    <meta:editing-cycles>1</meta:editing-cycles>
    <meta:document-statistic meta:table-count="0" meta:image-count="1" meta:object-count="0" meta:page-count="4" meta:paragraph-count="38" meta:word-count="420" meta:character-count="2291" meta:non-whitespace-character-count="1900"/>
    <meta:generator>LibreOffice/25.8.1.1$Windows_X86_64 LibreOffice_project/54047653041915e595ad4e45cccea684809c77b5</meta:generator>
  </office:meta>
</office:document-meta>
</file>